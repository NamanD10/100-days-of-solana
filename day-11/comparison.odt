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1000002A35412E3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40b15" officeooo:paragraph-rsid="00040b15" style:font-size-asian="24pt" style:font-size-complex="2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ISON b/w Traditional DB and SOLANA Accounts</text:p>
      <text:p text:style-name="Standard"/>
      <text:p text:style-name="Standard"/>
      <text:p text:style-name="Standard"><draw:frame draw:style-name="fr1" draw:name="Image1" text:anchor-type="char" svg:width="19.905cm" svg:height="8.55cm" draw:z-index="0"><draw:image xlink:href="Pictures/1000000100000671000002A35412E3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20:18:22.827639200</meta:creation-date>
    <dc:date>2026-05-06T20:28:44.070780400</dc:date>
    <meta:editing-duration>PT9M31S</meta:editing-duration>
    <meta:editing-cycles>2</meta:editing-cycles>
    <meta:generator>LibreOffice/25.2.7.2$Windows_X86_64 LibreOffice_project/5cbfd1ab6520636bb5f7b99185aa69bd7456825d</meta:generator>
    <meta:document-statistic meta:table-count="0" meta:image-count="1" meta:object-count="0" meta:page-count="1" meta:paragraph-count="1" meta:word-count="7" meta:character-count="49" meta:non-whitespace-character-count="43"/>
  </office:meta>
</office:document-meta>
</file>